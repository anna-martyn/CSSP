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1.25in"/>
    </style:style>
    <style:style style:name="Table1.B" style:family="table-column">
      <style:table-column-properties style:column-width="0.8111in"/>
    </style:style>
    <style:style style:name="Table1.C" style:family="table-column">
      <style:table-column-properties style:column-width="4.635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5c0d2"/>
    </style:style>
    <style:style style:name="P2" style:family="paragraph" style:parent-style-name="Standard">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 style:family="paragraph" style:parent-style-name="Standard">
      <style:text-properties fo:font-variant="normal" fo:text-transform="none" fo:color="#000000" loext:opacity="100%" style:font-name="Liberation Serif" fo:font-size="12pt" fo:letter-spacing="normal" fo:font-style="normal" fo:font-weight="normal" officeooo:paragraph-rsid="0015b9eb"/>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ext-properties fo:color="#000000" loext:opacity="100%" style:font-name="Liberation Serif" officeooo:paragraph-rsid="0015c0d2"/>
    </style:style>
    <style:style style:name="P6" style:family="paragraph" style:parent-style-name="Standard">
      <style:paragraph-properties fo:margin-left="0in" fo:margin-right="0in" fo:orphans="2" fo:widows="2" fo:text-indent="0in" style:auto-text-indent="false"/>
      <style:text-properties fo:color="#000000" loext:opacity="100%" style:font-name="Liberation Serif"/>
    </style:style>
    <style:style style:name="P7" style:family="paragraph" style:parent-style-name="Standard">
      <style:paragraph-properties fo:margin-left="0in" fo:margin-right="0in" fo:orphans="2" fo:widows="2" fo:text-indent="0in" style:auto-text-indent="false"/>
      <style:text-properties fo:color="#000000" loext:opacity="100%" style:font-name="Liberation Serif" officeooo:paragraph-rsid="001645b7"/>
    </style:style>
    <style:style style:name="P8" style:family="paragraph" style:parent-style-name="Standard">
      <style:text-properties fo:color="#000000" loext:opacity="100%" style:font-name="Liberation Serif"/>
    </style:style>
    <style:style style:name="P9" style:family="paragraph" style:parent-style-name="Table_20_Contents">
      <style:text-properties officeooo:rsid="0015b9eb" officeooo:paragraph-rsid="0015b9eb"/>
    </style:style>
    <style:style style:name="P10" style:family="paragraph" style:parent-style-name="Table_20_Contents">
      <style:paragraph-properties fo:text-align="center" style:justify-single-word="false"/>
      <style:text-properties fo:color="#000000" loext:opacity="100%" style:font-name="Liberation Serif" officeooo:rsid="0015b9eb" officeooo:paragraph-rsid="0015b9eb"/>
    </style:style>
    <style:style style:name="P11" style:family="paragraph" style:parent-style-name="Table_20_Contents">
      <style:text-properties fo:color="#000000" loext:opacity="100%" style:font-name="Liberation Serif" officeooo:rsid="0015b9eb" officeooo:paragraph-rsid="0015b9eb"/>
    </style:style>
    <style:style style:name="T1" style:family="text">
      <style:text-properties fo:font-variant="normal" fo:text-transform="none" fo:color="#cccccc" loext:opacity="100%" style:font-name="Droid Sans Mono" fo:font-size="12pt" fo:letter-spacing="normal" fo:font-style="normal" fo:font-weight="normal"/>
    </style:style>
    <style:style style:name="T2" style:family="text">
      <style:text-properties fo:font-variant="normal" fo:text-transform="none" fo:color="#cccccc" loext:opacity="100%" style:font-name="Droid Sans Mono" fo:font-size="12pt" fo:letter-spacing="normal" fo:font-style="normal" fo:font-weight="normal" officeooo:rsid="001645b7"/>
    </style:style>
    <style:style style:name="T3" style:family="text">
      <style:text-properties fo:font-variant="normal" fo:text-transform="none" fo:color="#cccccc" loext:opacity="100%" fo:font-size="12pt" fo:letter-spacing="normal" fo:font-style="normal" fo:font-weight="normal"/>
    </style:style>
    <style:style style:name="T4" style:family="text">
      <style:text-properties fo:font-variant="normal" fo:text-transform="none" fo:color="#cccccc" loext:opacity="100%" fo:font-size="12pt" fo:letter-spacing="normal" fo:font-style="normal" fo:font-weight="normal" officeooo:rsid="001645b7"/>
    </style:style>
    <style:style style:name="T5" style:family="text">
      <style:text-properties fo:font-variant="normal" fo:text-transform="none" fo:color="#cccccc" loext:opacity="100%" style:font-name="Liberation Serif" fo:font-size="12pt" fo:letter-spacing="normal" fo:font-style="normal" fo:font-weight="normal"/>
    </style:style>
    <style:style style:name="T6" style:family="text">
      <style:text-properties fo:font-variant="normal" fo:text-transform="none" fo:font-size="12pt" fo:letter-spacing="normal" fo:font-style="normal" fo:font-weight="normal"/>
    </style:style>
    <style:style style:name="T7" style:family="text">
      <style:text-properties fo:font-variant="normal" fo:text-transform="none" fo:font-size="12pt" fo:letter-spacing="normal" fo:font-style="normal" fo:font-weight="normal" officeooo:rsid="001645b7"/>
    </style:style>
    <style:style style:name="T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style>
    <style:style style:name="T9" style:family="text">
      <style:text-properties fo:font-variant="normal" fo:text-transform="none" fo:color="#4daafc" loext:opacity="100%" style:text-line-through-style="none" style:text-line-through-type="none" style:font-name="Droid Sans Mono" fo:font-size="12pt" fo:letter-spacing="normal" fo:font-style="normal" style:text-underline-style="none" fo:font-weight="normal" style:text-blinking="false"/>
    </style:style>
    <style:style style:name="T10" style:family="text">
      <style:text-properties fo:font-variant="normal" fo:text-transform="none" fo:color="#4daafc" loext:opacity="100%" style:text-line-through-style="none" style:text-line-through-type="none" fo:font-size="12pt" fo:letter-spacing="normal" fo:font-style="normal" style:text-underline-style="none" fo:font-weight="normal" style:text-blinking="false"/>
    </style:style>
    <style:style style:name="T11" style:family="text">
      <style:text-properties fo:font-variant="normal" fo:text-transform="none" fo:color="#4daafc" loext:opacity="100%" style:text-line-through-style="none" style:text-line-through-type="none" style:font-name="Liberation Serif" fo:font-size="12pt" fo:letter-spacing="normal" fo:font-style="normal" style:text-underline-style="none" fo:font-weight="normal" style:text-blinking="false"/>
    </style:style>
    <style:style style:name="T12" style:family="text">
      <style:text-properties fo:font-variant="normal" fo:text-transform="none" style:font-name="Liberation Serif" fo:font-size="12pt" fo:letter-spacing="normal" fo:font-style="normal" fo:font-weight="normal"/>
    </style:style>
    <style:style style:name="T13" style:family="text">
      <style:text-properties fo:font-variant="normal" fo:text-transform="none" fo:color="#000000" loext:opacity="100%" style:font-name="Liberation Serif" fo:font-size="12pt" fo:letter-spacing="normal" fo:font-style="normal" fo:font-weight="normal"/>
    </style:style>
    <style:style style:name="T1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0">Package name</text:p>
          </table:table-cell>
          <table:table-cell table:style-name="Table1.A1" office:value-type="string">
            <text:p text:style-name="P10">Version number</text:p>
          </table:table-cell>
          <table:table-cell table:style-name="Table1.C1" office:value-type="string">
            <text:p text:style-name="P10">Citation (maybe remove this column and cite using whatever system)</text:p>
          </table:table-cell>
        </table:table-row>
        <table:table-row>
          <table:table-cell table:style-name="Table1.A2" office:value-type="string">
            <text:p text:style-name="P11">codacore</text:p>
          </table:table-cell>
          <table:table-cell table:style-name="Table1.A2" office:value-type="string">
            <text:p text:style-name="P11">0.0.4</text:p>
          </table:table-cell>
          <table:table-cell table:style-name="Table1.C2" office:value-type="string">
            <text:p text:style-name="P1">Elliott Gordon-Rodriguez, Thomas P Quinn, John P Cunningham, Learning sparse log-ratios for high-throughput sequencing data, Bioinformatics, 2021;,</text:p>
            <text:p text:style-name="P5"><text:span text:style-name="T6">btab645, doi:10.1093/bioinformatics/btab645</text:span></text:p>
          </table:table-cell>
        </table:table-row>
        <table:table-row>
          <table:table-cell table:style-name="Table1.A2" office:value-type="string">
            <text:p text:style-name="P11">cowplot</text:p>
          </table:table-cell>
          <table:table-cell table:style-name="Table1.A2" office:value-type="string">
            <text:p text:style-name="P11">1.2.0</text:p>
          </table:table-cell>
          <table:table-cell table:style-name="Table1.C2" office:value-type="string">
            <text:p text:style-name="P1">Wilke C (2025). _cowplot: Streamlined Plot Theme and Plot Annotations for 'ggplot2'_.</text:p>
            <text:p text:style-name="P1">doi:10.32614/CRAN.package.cowplot</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cowplot</text:span></text:a><text:span text:style-name="T13">&gt;, R package version 1.2.0,</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cowplot</text:span></text:a><text:span text:style-name="T13">&gt;.</text:span></text:p>
          </table:table-cell>
        </table:table-row>
        <table:table-row>
          <table:table-cell table:style-name="Table1.A2" office:value-type="string">
            <text:p text:style-name="P11">data.table</text:p>
          </table:table-cell>
          <table:table-cell table:style-name="Table1.A2" office:value-type="string">
            <text:p text:style-name="P11">1.17.8</text:p>
          </table:table-cell>
          <table:table-cell table:style-name="Table1.C2" office:value-type="string">
            <text:p text:style-name="P2">Barrett T, Dowle M, Srinivasan A, Gorecki J, Chirico M, Hocking T,Schwendinger B, Krylov I (2025). _data.table: Extension of `data.frame`_.</text:p>
            <text:p text:style-name="P2">doi:10.32614/CRAN.package.data.table</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data.table</text:span></text:a><text:span text:style-name="T13">&gt;, R package version 1.17.8,</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data.table</text:span></text:a><text:span text:style-name="T13">&gt;.</text:span></text:p>
          </table:table-cell>
        </table:table-row>
        <table:table-row>
          <table:table-cell table:style-name="Table1.A2" office:value-type="string">
            <text:p text:style-name="P11">dplyr</text:p>
          </table:table-cell>
          <table:table-cell table:style-name="Table1.A2" office:value-type="string">
            <text:p text:style-name="P11">1.1.4</text:p>
          </table:table-cell>
          <table:table-cell table:style-name="Table1.C2" office:value-type="string">
            <text:p text:style-name="P2">Wickham H, François R, Henry L, Müller K, Vaughan D (2023). _dplyr: A Grammar of Data Manipulation_. doi:10.32614/CRAN.package.dplyr</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dplyr</text:span></text:a><text:span text:style-name="T13">&gt;, R package version 1.1.4,</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dplyr</text:span></text:a><text:span text:style-name="T13">&gt;.</text:span></text:p>
          </table:table-cell>
        </table:table-row>
        <table:table-row>
          <table:table-cell table:style-name="Table1.A2" office:value-type="string">
            <text:p text:style-name="P11">ggh4x</text:p>
          </table:table-cell>
          <table:table-cell table:style-name="Table1.A2" office:value-type="string">
            <text:p text:style-name="P11">0.3.1</text:p>
          </table:table-cell>
          <table:table-cell table:style-name="Table1.C2" office:value-type="string">
            <text:p text:style-name="P2">van den Brand T (2025). _ggh4x: Hacks for 'ggplot2'_.</text:p>
            <text:p text:style-name="P4"><text:span text:style-name="T13">doi:10.32614/CRAN.package.ggh4x &lt;</text:span><text:a xlink:type="simple" xlink:href="vscode-file://vscode-app/usr/share/positron/resources/app/out/vs/code/electron-browser/workbench/workbench.html#" text:style-name="Internet_20_link" text:visited-style-name="Visited_20_Internet_20_Link"><text:span text:style-name="T14">https://doi.org/10.32614/CRAN.package.ggh4x</text:span></text:a><text:span text:style-name="T13">&gt;,</text:span></text:p>
            <text:p text:style-name="P4"><text:span text:style-name="T13">R package version 0.3.1, &lt;</text:span><text:a xlink:type="simple" xlink:href="vscode-file://vscode-app/usr/share/positron/resources/app/out/vs/code/electron-browser/workbench/workbench.html#" text:style-name="Internet_20_link" text:visited-style-name="Visited_20_Internet_20_Link"><text:span text:style-name="T14">https://CRAN.R-project.org/package=ggh4x</text:span></text:a><text:span text:style-name="T13">&gt;.</text:span></text:p>
          </table:table-cell>
        </table:table-row>
        <table:table-row>
          <table:table-cell table:style-name="Table1.A2" office:value-type="string">
            <text:p text:style-name="P11">ggplot2</text:p>
          </table:table-cell>
          <table:table-cell table:style-name="Table1.A2" office:value-type="string">
            <text:p text:style-name="P11">4.0.1</text:p>
          </table:table-cell>
          <table:table-cell table:style-name="Table1.C2" office:value-type="string">
            <text:p text:style-name="P6"><text:span text:style-name="T6">H. Wickham. ggplot2: Elegant Graphics for Data Analysis. Springer-Verlag New York, 2016.</text:span></text:p>
            <text:p text:style-name="P7"><text:span text:style-name="T7">ISBN: </text:span><text:span text:style-name="T6">978-3-319-24277-4</text:span></text:p>
          </table:table-cell>
        </table:table-row>
        <table:table-row>
          <table:table-cell table:style-name="Table1.A2" office:value-type="string">
            <text:p text:style-name="P11">ggpubr</text:p>
          </table:table-cell>
          <table:table-cell table:style-name="Table1.A2" office:value-type="string">
            <text:p text:style-name="P11">0.6.2</text:p>
          </table:table-cell>
          <table:table-cell table:style-name="Table1.C2" office:value-type="string">
            <text:p text:style-name="P2">Kassambara A (2025). _ggpubr: 'ggplot2' Based Publication Ready Plots_.</text:p>
            <text:p text:style-name="P2">doi:10.32614/CRAN.package.ggpubr</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ggpubr</text:span></text:a><text:span text:style-name="T13">&gt;, R package version 0.6.2,</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ggpubr</text:span></text:a><text:span text:style-name="T13">&gt;.</text:span></text:p>
          </table:table-cell>
        </table:table-row>
        <table:table-row>
          <table:table-cell table:style-name="Table1.A2" office:value-type="string">
            <text:p text:style-name="P11">ggtext</text:p>
          </table:table-cell>
          <table:table-cell table:style-name="Table1.A2" office:value-type="string">
            <text:p text:style-name="P11">0.1.2</text:p>
          </table:table-cell>
          <table:table-cell table:style-name="Table1.C2" office:value-type="string">
            <text:p text:style-name="P2">Wilke C, Wiernik B (2022). _ggtext: Improved Text Rendering Support for 'ggplot2'_. doi:10.32614/CRAN.package.ggtext</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ggtext</text:span></text:a><text:span text:style-name="T13">&gt;, R package version 0.1.2,</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ggtext</text:span></text:a><text:span text:style-name="T13">&gt;.</text:span></text:p>
          </table:table-cell>
        </table:table-row>
        <table:table-row>
          <table:table-cell table:style-name="Table1.A2" office:value-type="string">
            <text:p text:style-name="P11">ggVennDiagram</text:p>
          </table:table-cell>
          <table:table-cell table:style-name="Table1.A2" office:value-type="string">
            <text:p text:style-name="P11">1.5.4</text:p>
          </table:table-cell>
          <table:table-cell table:style-name="Table1.C2" office:value-type="string">
            <text:p text:style-name="P2">Gao C, Dusa A (2025). _ggVennDiagram: A 'ggplot2' Implement of Venn Diagram_.</text:p>
            <text:p text:style-name="P2">doi:10.32614/CRAN.package.ggVennDiagram</text:p>
            <text:p text:style-name="P4"><text:soft-page-break/><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ggVennDiagram</text:span></text:a><text:span text:style-name="T13">&gt;, R package version</text:span></text:p>
            <text:p text:style-name="P4"><text:span text:style-name="T13">1.5.4, &lt;</text:span><text:a xlink:type="simple" xlink:href="vscode-file://vscode-app/usr/share/positron/resources/app/out/vs/code/electron-browser/workbench/workbench.html#" text:style-name="Internet_20_link" text:visited-style-name="Visited_20_Internet_20_Link"><text:span text:style-name="T14">https://CRAN.R-project.org/package=ggVennDiagram</text:span></text:a><text:span text:style-name="T13">&gt;.</text:span></text:p>
          </table:table-cell>
        </table:table-row>
        <table:table-row>
          <table:table-cell table:style-name="Table1.A2" office:value-type="string">
            <text:p text:style-name="P11">Gmisc</text:p>
          </table:table-cell>
          <table:table-cell table:style-name="Table1.A2" office:value-type="string">
            <text:p text:style-name="P11">3.0.4</text:p>
          </table:table-cell>
          <table:table-cell table:style-name="Table1.C2" office:value-type="string">
            <text:p text:style-name="P2">Gordon M (2025). _Gmisc: Descriptive Statistics, Transition Plots, and More_.</text:p>
            <text:p text:style-name="P4"><text:span text:style-name="T13">doi:10.32614/CRAN.package.Gmisc &lt;</text:span><text:a xlink:type="simple" xlink:href="vscode-file://vscode-app/usr/share/positron/resources/app/out/vs/code/electron-browser/workbench/workbench.html#" text:style-name="Internet_20_link" text:visited-style-name="Visited_20_Internet_20_Link"><text:span text:style-name="T14">https://doi.org/10.32614/CRAN.package.Gmisc</text:span></text:a><text:span text:style-name="T13">&gt;,</text:span></text:p>
            <text:p text:style-name="P4"><text:span text:style-name="T13">R package version 3.0.4, &lt;</text:span><text:a xlink:type="simple" xlink:href="vscode-file://vscode-app/usr/share/positron/resources/app/out/vs/code/electron-browser/workbench/workbench.html#" text:style-name="Internet_20_link" text:visited-style-name="Visited_20_Internet_20_Link"><text:span text:style-name="T14">https://CRAN.R-project.org/package=Gmisc</text:span></text:a><text:span text:style-name="T13">&gt;.</text:span></text:p>
          </table:table-cell>
        </table:table-row>
        <table:table-row>
          <table:table-cell table:style-name="Table1.A2" office:value-type="string">
            <text:p text:style-name="P11">gridExtra</text:p>
          </table:table-cell>
          <table:table-cell table:style-name="Table1.A2" office:value-type="string">
            <text:p text:style-name="P11">2.3</text:p>
          </table:table-cell>
          <table:table-cell table:style-name="Table1.C2" office:value-type="string">
            <text:p text:style-name="P2">Auguie B (2017). _gridExtra: Miscellaneous Functions for "Grid" Graphics_.</text:p>
            <text:p text:style-name="P2">doi:10.32614/CRAN.package.gridExtra</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gridExtra</text:span></text:a><text:span text:style-name="T13">&gt;, R package version 2.3,</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gridExtra</text:span></text:a><text:span text:style-name="T13">&gt;.</text:span></text:p>
          </table:table-cell>
        </table:table-row>
        <table:table-row>
          <table:table-cell table:style-name="Table1.A2" office:value-type="string">
            <text:p text:style-name="P11">htmlTable</text:p>
          </table:table-cell>
          <table:table-cell table:style-name="Table1.A2" office:value-type="string">
            <text:p text:style-name="P11">2.4.3</text:p>
          </table:table-cell>
          <table:table-cell table:style-name="Table1.C2" office:value-type="string">
            <text:p text:style-name="P2">Gordon M, Gragg S, Konings P (2024). _htmlTable: Advanced Tables for Markdown/HTML_. doi:10.32614/CRAN.package.htmlTable</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htmlTable</text:span></text:a><text:span text:style-name="T13">&gt;, R package version 2.4.3,</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htmlTable</text:span></text:a><text:span text:style-name="T13">&gt;.</text:span></text:p>
          </table:table-cell>
        </table:table-row>
        <table:table-row>
          <table:table-cell table:style-name="Table1.A2" office:value-type="string">
            <text:p text:style-name="P11">Maaslin2</text:p>
          </table:table-cell>
          <table:table-cell table:style-name="Table1.A2" office:value-type="string">
            <text:p text:style-name="P11">1.22.0</text:p>
          </table:table-cell>
          <table:table-cell table:style-name="Table1.C2" office:value-type="string">
            <text:p text:style-name="P3">Mallick H et al. (2021). Multivariable Association in Population-scale</text:p>
            <text:p text:style-name="P4"><text:span text:style-name="T13">Meta-omics Studies, </text:span><text:a xlink:type="simple" xlink:href="vscode-file://vscode-app/usr/share/positron/resources/app/out/vs/code/electron-browser/workbench/workbench.html#" text:style-name="Internet_20_link" text:visited-style-name="Visited_20_Internet_20_Link"><text:span text:style-name="T14">http://huttenhower.sph.harvard.edu/maaslin2.</text:span></text:a></text:p>
          </table:table-cell>
        </table:table-row>
        <table:table-row>
          <table:table-cell table:style-name="Table1.A2" office:value-type="string">
            <text:p text:style-name="P11">multcompView</text:p>
          </table:table-cell>
          <table:table-cell table:style-name="Table1.A2" office:value-type="string">
            <text:p text:style-name="P11">0.1-10</text:p>
          </table:table-cell>
          <table:table-cell table:style-name="Table1.C2" office:value-type="string">
            <text:p text:style-name="P3">Graves S, Piepho H, Dorai-Raj LSwhfS (2024). _multcompView: Visualizations of Paired Comparisons_. doi:10.32614/CRAN.package.multcompView</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multcompView</text:span></text:a><text:span text:style-name="T13">&gt;, R package version</text:span></text:p>
            <text:p text:style-name="P4"><text:span text:style-name="T13">0.1-10, &lt;</text:span><text:a xlink:type="simple" xlink:href="vscode-file://vscode-app/usr/share/positron/resources/app/out/vs/code/electron-browser/workbench/workbench.html#" text:style-name="Internet_20_link" text:visited-style-name="Visited_20_Internet_20_Link"><text:span text:style-name="T14">https://CRAN.R-project.org/package=multcompView</text:span></text:a><text:span text:style-name="T13">&gt;.</text:span></text:p>
          </table:table-cell>
        </table:table-row>
        <table:table-row>
          <table:table-cell table:style-name="Table1.A2" office:value-type="string">
            <text:p text:style-name="P11">patchwork</text:p>
          </table:table-cell>
          <table:table-cell table:style-name="Table1.A2" office:value-type="string">
            <text:p text:style-name="P11">1.3.2</text:p>
          </table:table-cell>
          <table:table-cell table:style-name="Table1.C2" office:value-type="string">
            <text:p text:style-name="P3">Pedersen T (2025). _patchwork: The Composer of Plots_.</text:p>
            <text:p text:style-name="P2">doi:10.32614/CRAN.package.patchwork</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patchwork</text:span></text:a><text:span text:style-name="T13">&gt;, R package version 1.3.2,</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patchwork</text:span></text:a><text:span text:style-name="T13">&gt;.</text:span></text:p>
          </table:table-cell>
        </table:table-row>
        <table:table-row>
          <table:table-cell table:style-name="Table1.A2" office:value-type="string">
            <text:p text:style-name="P11">phyloseq</text:p>
          </table:table-cell>
          <table:table-cell table:style-name="Table1.A2" office:value-type="string">
            <text:p text:style-name="P11">1.54.0</text:p>
          </table:table-cell>
          <table:table-cell table:style-name="Table1.C2" office:value-type="string">
            <text:p text:style-name="P3">phyloseq: An R package for reproducible interactive analysis and graphics of</text:p>
            <text:p text:style-name="P6"><text:span text:style-name="T6">microbiome census data. Paul J. McMurdie and Susan Holmes (2013) PLoS ONE 8(4):e61217.</text:span></text:p>
          </table:table-cell>
        </table:table-row>
        <table:table-row>
          <table:table-cell table:style-name="Table1.A2" office:value-type="string">
            <text:p text:style-name="P11">scales</text:p>
          </table:table-cell>
          <table:table-cell table:style-name="Table1.A2" office:value-type="string">
            <text:p text:style-name="P11">1.4.0</text:p>
          </table:table-cell>
          <table:table-cell table:style-name="Table1.C2" office:value-type="string">
            <text:p text:style-name="P3">Wickham H, Pedersen T, Seidel D (2025). _scales: Scale Functions for Visualization_. doi:10.32614/CRAN.package.scales</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scales</text:span></text:a><text:span text:style-name="T13">&gt;, R package version 1.4.0,</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scales</text:span></text:a><text:span text:style-name="T13">&gt;.</text:span></text:p>
          </table:table-cell>
        </table:table-row>
        <table:table-row>
          <table:table-cell table:style-name="Table1.A2" office:value-type="string">
            <text:p text:style-name="P11">tensorflow</text:p>
          </table:table-cell>
          <table:table-cell table:style-name="Table1.A2" office:value-type="string">
            <text:p text:style-name="P11">2.20.0</text:p>
          </table:table-cell>
          <table:table-cell table:style-name="Table1.C2" office:value-type="string">
            <text:p text:style-name="P3">Allaire J, Tang Y (2025). _tensorflow: R Interface to 'TensorFlow'_.</text:p>
            <text:p text:style-name="P2">doi:10.32614/CRAN.package.tensorflow</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tensorflow</text:span></text:a><text:span text:style-name="T13">&gt;, R package version 2.20.0, &lt;</text:span><text:a xlink:type="simple" xlink:href="vscode-file://vscode-app/usr/share/positron/resources/app/out/vs/code/electron-browser/workbench/workbench.html#" text:style-name="Internet_20_link" text:visited-style-name="Visited_20_Internet_20_Link"><text:span text:style-name="T14">https://CRAN.R-project.org/package=tensorflow</text:span></text:a><text:span text:style-name="T13">&gt;.</text:span></text:p>
          </table:table-cell>
        </table:table-row>
        <text:soft-page-break/>
        <table:table-row>
          <table:table-cell table:style-name="Table1.A2" office:value-type="string">
            <text:p text:style-name="P11">tibble</text:p>
          </table:table-cell>
          <table:table-cell table:style-name="Table1.A2" office:value-type="string">
            <text:p text:style-name="P11">3.3.0</text:p>
          </table:table-cell>
          <table:table-cell table:style-name="Table1.C2" office:value-type="string">
            <text:p text:style-name="P3">Müller K, Wickham H (2025). _tibble: Simple Data Frames_.</text:p>
            <text:p text:style-name="P2">doi:10.32614/CRAN.package.tibble</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doi.org/10.32614/CRAN.package.tibble</text:span></text:a><text:span text:style-name="T13">&gt;, R package version 3.3.0,</text:span></text:p>
            <text:p text:style-name="P4"><text:span text:style-name="T13">&lt;</text:span><text:a xlink:type="simple" xlink:href="vscode-file://vscode-app/usr/share/positron/resources/app/out/vs/code/electron-browser/workbench/workbench.html#" text:style-name="Internet_20_link" text:visited-style-name="Visited_20_Internet_20_Link"><text:span text:style-name="T14">https://CRAN.R-project.org/package=tibble</text:span></text:a><text:span text:style-name="T13">&gt;.</text:span></text:p>
          </table:table-cell>
        </table:table-row>
        <table:table-row>
          <table:table-cell table:style-name="Table1.A2" office:value-type="string">
            <text:p text:style-name="P11">tidyr</text:p>
          </table:table-cell>
          <table:table-cell table:style-name="Table1.A2" office:value-type="string">
            <text:p text:style-name="P11">1.3.1</text:p>
          </table:table-cell>
          <table:table-cell table:style-name="Table1.C2" office:value-type="string">
            <text:p text:style-name="P3">Wickham H, Vaughan D, Girlich M (2024). _tidyr: Tidy Messy Data_.</text:p>
            <text:p text:style-name="P4"><text:span text:style-name="T13">doi:10.32614/CRAN.package.tidyr &lt;</text:span><text:a xlink:type="simple" xlink:href="vscode-file://vscode-app/usr/share/positron/resources/app/out/vs/code/electron-browser/workbench/workbench.html#" text:style-name="Internet_20_link" text:visited-style-name="Visited_20_Internet_20_Link"><text:span text:style-name="T14">https://doi.org/10.32614/CRAN.package.tidyr</text:span></text:a><text:span text:style-name="T13">&gt;,</text:span></text:p>
            <text:p text:style-name="P4"><text:span text:style-name="T13">R package version 1.3.1, &lt;</text:span><text:a xlink:type="simple" xlink:href="vscode-file://vscode-app/usr/share/positron/resources/app/out/vs/code/electron-browser/workbench/workbench.html#" text:style-name="Internet_20_link" text:visited-style-name="Visited_20_Internet_20_Link"><text:span text:style-name="T14">https://CRAN.R-project.org/package=tidyr</text:span></text:a><text:span text:style-name="T13">&gt;.</text:span></text:p>
          </table:table-cell>
        </table:table-row>
        <table:table-row>
          <table:table-cell table:style-name="Table1.A2" office:value-type="string">
            <text:p text:style-name="P11">vegan</text:p>
          </table:table-cell>
          <table:table-cell table:style-name="Table1.A2" office:value-type="string">
            <text:p text:style-name="P11">2.7-2</text:p>
          </table:table-cell>
          <table:table-cell table:style-name="Table1.C2" office:value-type="string">
            <text:p text:style-name="P3">Oksanen J, Simpson G, Blanchet F, Kindt R, Legendre P, Minchin P, O'Hara R, Solymos P, Stevens M, Szoecs E, Wagner H, Barbour M, Bedward M, Bolker B, Borcard D, Borman T, Carvalho G, Chirico M, De Caceres M, Durand S, Evangelista H, FitzJohn R, Friendly M, Furneaux B, Hannigan G, Hill M, Lahti</text:p>
            <text:p text:style-name="P2">L, Martino C, McGlinn D, Ouellette M, Ribeiro Cunha E, Smith T, Stier A, Ter Braak C, Weedon J (2025). _vegan: Community Ecology Package_.</text:p>
            <text:p text:style-name="P4"><text:span text:style-name="T13">doi:10.32614/CRAN.package.vegan &lt;</text:span><text:a xlink:type="simple" xlink:href="vscode-file://vscode-app/usr/share/positron/resources/app/out/vs/code/electron-browser/workbench/workbench.html#" text:style-name="Internet_20_link" text:visited-style-name="Visited_20_Internet_20_Link"><text:span text:style-name="T14">https://doi.org/10.32614/CRAN.package.vegan</text:span></text:a><text:span text:style-name="T13">&gt;,</text:span></text:p>
            <text:p text:style-name="P4"><text:span text:style-name="T13">R package version 2.7-2, &lt;</text:span><text:a xlink:type="simple" xlink:href="vscode-file://vscode-app/usr/share/positron/resources/app/out/vs/code/electron-browser/workbench/workbench.html#" text:style-name="Internet_20_link" text:visited-style-name="Visited_20_Internet_20_Link"><text:span text:style-name="T14">https://CRAN.R-project.org/package=vegan</text:span></text:a><text:span text:style-name="T13">&gt;.</text:span></text:p>
          </table:table-cell>
        </table:table-row>
      </table:table>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13:08:02.928800281</meta:creation-date>
    <dc:date>2026-04-09T13:37:28.246556594</dc:date>
    <meta:editing-duration>PT9M5S</meta:editing-duration>
    <meta:editing-cycles>1</meta:editing-cycles>
    <meta:document-statistic meta:table-count="1" meta:image-count="0" meta:object-count="0" meta:page-count="3" meta:paragraph-count="112" meta:word-count="506" meta:character-count="5262" meta:non-whitespace-character-count="4868"/>
    <meta:generator>LibreOffice/7.3.7.2$Linux_X86_64 LibreOffice_project/30$Build-2</meta:generator>
  </office:meta>
</office:document-meta>
</file>