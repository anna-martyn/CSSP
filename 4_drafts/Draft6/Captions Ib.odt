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b3fd" officeooo:paragraph-rsid="0003b3fd"/>
    </style:style>
    <style:style style:name="P2" style:family="paragraph" style:parent-style-name="Standard">
      <style:text-properties officeooo:rsid="0009e527" officeooo:paragraph-rsid="0009e527"/>
    </style:style>
    <style:style style:name="P3" style:family="paragraph" style:parent-style-name="Standard">
      <style:text-properties officeooo:rsid="000ee3c4" officeooo:paragraph-rsid="000ee3c4"/>
    </style:style>
    <style:style style:name="P4" style:family="paragraph" style:parent-style-name="Standard">
      <style:text-properties officeooo:rsid="000f6049" officeooo:paragraph-rsid="000f6049"/>
    </style:style>
    <style:style style:name="T1" style:family="text">
      <style:text-properties fo:font-weight="bold" style:font-weight-asian="bold" style:font-weight-complex="bold"/>
    </style:style>
    <style:style style:name="T2" style:family="text">
      <style:text-properties fo:font-weight="bold" officeooo:rsid="0004f095" style:font-weight-asian="bold" style:font-weight-complex="bold"/>
    </style:style>
    <style:style style:name="T3" style:family="text">
      <style:text-properties fo:font-weight="bold" officeooo:rsid="00064ed1" style:font-weight-asian="bold" style:font-weight-complex="bold"/>
    </style:style>
    <style:style style:name="T4" style:family="text">
      <style:text-properties fo:font-weight="bold" officeooo:rsid="000bc961" style:font-weight-asian="bold" style:font-weight-complex="bold"/>
    </style:style>
    <style:style style:name="T5" style:family="text">
      <style:text-properties fo:font-weight="bold" officeooo:rsid="000d9870" style:font-weight-asian="bold" style:font-weight-complex="bold"/>
    </style:style>
    <style:style style:name="T6" style:family="text">
      <style:text-properties fo:font-weight="bold" officeooo:rsid="000f6049" style:font-weight-asian="bold" style:font-weight-complex="bold"/>
    </style:style>
    <style:style style:name="T7" style:family="text">
      <style:text-properties officeooo:rsid="0004f095"/>
    </style:style>
    <style:style style:name="T8" style:family="text">
      <style:text-properties fo:font-weight="normal" style:font-weight-asian="normal" style:font-weight-complex="normal"/>
    </style:style>
    <style:style style:name="T9" style:family="text">
      <style:text-properties fo:font-weight="normal" officeooo:rsid="0004f095" style:font-weight-asian="normal" style:font-weight-complex="normal"/>
    </style:style>
    <style:style style:name="T10" style:family="text">
      <style:text-properties fo:font-weight="normal" officeooo:rsid="00064ed1" style:font-weight-asian="normal" style:font-weight-complex="normal"/>
    </style:style>
    <style:style style:name="T11" style:family="text">
      <style:text-properties fo:font-weight="normal" officeooo:rsid="000802d3" style:font-weight-asian="normal" style:font-weight-complex="normal"/>
    </style:style>
    <style:style style:name="T12" style:family="text">
      <style:text-properties fo:font-weight="normal" officeooo:rsid="000bc961" style:font-weight-asian="normal" style:font-weight-complex="normal"/>
    </style:style>
    <style:style style:name="T13" style:family="text">
      <style:text-properties fo:font-weight="normal" officeooo:rsid="000d9870" style:font-weight-asian="normal" style:font-weight-complex="normal"/>
    </style:style>
    <style:style style:name="T14" style:family="text">
      <style:text-properties officeooo:rsid="000802d3"/>
    </style:style>
    <style:style style:name="T15" style:family="text">
      <style:text-properties style:text-position="sub 58%"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aption for </text:span><text:span text:style-name="T6">F</text:span><text:span text:style-name="T1">igure </text:span><text:span text:style-name="T3">3</text:span>: Results from predictive modeling of soil <text:span text:style-name="T14">type</text:span> <text:span text:style-name="T14">across</text:span> genotype. <text:span text:style-name="T1">A</text:span> shows <text:span text:style-name="T7">a flowchart that demonstrates the nested prediction approach. </text:span><text:span text:style-name="T2">B</text:span><text:span text:style-name="T9"> shows the results of prediction on the test dataset, where </text:span><text:span text:style-name="T11">the x-axis represents the true soil type and the y-axis represents the soil type predicted by the model. Each dot represents a data-point from the test dataset. B</text:span><text:span text:style-name="T9">ubbles on the diagonal represents accurate correct predictions, </text:span><text:span text:style-name="T11">and off-diagonal bubbles represent incorrect incorrect predictions</text:span><text:span text:style-name="T9">. </text:span><text:span text:style-name="T2">C</text:span><text:span text:style-name="T9"> shows the number of log-ratios involved in each model 1 (NPK ratios) and model 2 (PK ratios) with the number of ASVs in each log-ratio in parentheses, </text:span><text:span text:style-name="T10">as well as</text:span><text:span text:style-name="T9"> the prediction accuracy on the test data set. </text:span><text:span text:style-name="T2">D</text:span><text:span text:style-name="T9"> shows the average cumulative relative abundance of the ASVs involved </text:span><text:span text:style-name="T10">in the prediction (any log-ratio in either model) separated by order.</text:span></text:p>
      <text:p text:style-name="P1"><text:span text:style-name="T10"/></text:p>
      <text:p text:style-name="P2"><text:span text:style-name="T3">C</text:span><text:span text:style-name="T1">aption for </text:span><text:span text:style-name="T6">F</text:span><text:span text:style-name="T1">igure 5:</text:span><text:span text:style-name="T8"> Summary of results from root exudate data from lotus and hordeum. </text:span><text:span text:style-name="T1">A</text:span><text:span text:style-name="T8"> shows principal coordinates for all non-control samples after filtering out background features, separated by host species. </text:span><text:span text:style-name="T1">B</text:span><text:span text:style-name="T8"> shows a volcano plot with the log</text:span><text:span text:style-name="T15">2</text:span><text:span text:style-name="T8"> fold-change compared to wild-type for each of the CSSP mutant on the x-axis, and an appopriately transformed FDR-adjusted p-value on the y-axis. Dots are coloured blue if the intensity corresponding feature is statistically significantly decreased compared to wild-type, red if it is statistically significantly enriched, and gray if no significant difference was found. The number in the corner of each panel shows the number of features that statistically significantly different between wild-type and the corresponding mutant. </text:span><text:span text:style-name="T1">C</text:span><text:span text:style-name="T8"> illustrates the number of features of each class that are statistically significantly different between </text:span><text:span text:style-name="T12">wild-type, and the mutant on the x-axis, separated by host species. </text:span><text:span text:style-name="T4">D</text:span><text:span text:style-name="T12"> shows boxplots that illustrate the intensities measured for each genotype for a selection of features. </text:span><text:span text:style-name="T13">An asterisk indicates that a statistically significantly difference between the wild-type and the mutant it is displayed over was found for the features indicated by the panel.</text:span></text:p>
      <text:p text:style-name="P2"><text:span text:style-name="T13"/></text:p>
      <text:p text:style-name="P3"><text:span text:style-name="T5">C</text:span><text:span text:style-name="T1">aption for </text:span><text:span text:style-name="T6">S</text:span><text:span text:style-name="T1">upplementary </text:span><text:span text:style-name="T6">F</text:span><text:span text:style-name="T1">igure 5:</text:span><text:span text:style-name="T8"> Boxplots showing the cumulative intensity of each pathway, separated by genotype and host species. </text:span><text:span text:style-name="T13">An asterisk indicates that a statistically significantly difference between the wild-type and the mutant it is displayed over was found for the </text:span><text:span text:style-name="T8">pathway</text:span><text:span text:style-name="T13"> indicated by the panel.</text:span></text:p>
      <text:p text:style-name="P3"><text:span text:style-name="T13"/></text:p>
      <text:p text:style-name="P4"><text:span text:style-name="T5">C</text:span><text:span text:style-name="T1">aption for Supplementary Table 4:</text:span><text:span text:style-name="T8"> Results from comparisons of intensities between wild-type and CSSP mutant in lotus. The first column denotes the feature id, the next four columns denotes whether a statistically significant difference was found between the wild-type and the mutant after which the column is named. A 1 indicates enrichment, -1 indicates depletion, and 0 indicates that no significance was found. The next twenty columns indicates the measured intensities for each features, and the remaining columns indicate the feature annotations.</text:span></text:p>
      <text:p text:style-name="P4"><text:span text:style-name="T8"/></text:p>
      <text:p text:style-name="P4"><text:span text:style-name="T5">C</text:span><text:span text:style-name="T1">aption for Supplementary Table 5:</text:span><text:span text:style-name="T8"> Results from comparisons of intensities between wild-type and CSSP mutant in hordeum. The first column denotes the feature id, the next four columns denotes whether a statistically significant difference was found between the wild-type and the mutant after which the column is named. A 1 indicates enrichment, -1 indicates depletion, and 0 indicates that no significance was found. The next twenty columns indicates the measured intensities for each features, and the remaining columns indicate the feature annota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4:17:09.871026970</meta:creation-date>
    <dc:date>2026-02-17T14:39:46.217186445</dc:date>
    <meta:editing-duration>PT22M44S</meta:editing-duration>
    <meta:editing-cycles>6</meta:editing-cycles>
    <meta:generator>LibreOffice/7.3.7.2$Linux_X86_64 LibreOffice_project/30$Build-2</meta:generator>
    <meta:document-statistic meta:table-count="0" meta:image-count="0" meta:object-count="0" meta:page-count="1" meta:paragraph-count="5" meta:word-count="532" meta:character-count="3512" meta:non-whitespace-character-count="2985"/>
  </office:meta>
</office:document-meta>
</file>