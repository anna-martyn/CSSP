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3b3fd" officeooo:paragraph-rsid="0003b3fd"/>
    </style:style>
    <style:style style:name="P2" style:family="paragraph" style:parent-style-name="Standard">
      <style:text-properties officeooo:rsid="000ee3c4" officeooo:paragraph-rsid="000ee3c4"/>
    </style:style>
    <style:style style:name="P3" style:family="paragraph" style:parent-style-name="Standard">
      <style:text-properties officeooo:rsid="000f6049" officeooo:paragraph-rsid="000f6049"/>
    </style:style>
    <style:style style:name="P4" style:family="paragraph" style:parent-style-name="Standard">
      <style:text-properties fo:font-weight="normal" officeooo:rsid="00064ed1" officeooo:paragraph-rsid="0003b3fd" style:font-weight-asian="normal" style:font-weight-complex="normal"/>
    </style:style>
    <style:style style:name="P5" style:family="paragraph" style:parent-style-name="Standard">
      <style:text-properties fo:font-weight="normal" officeooo:rsid="000d9870" officeooo:paragraph-rsid="0009e527" style:font-weight-asian="normal" style:font-weight-complex="normal"/>
    </style:style>
    <style:style style:name="P6" style:family="paragraph" style:parent-style-name="Standard">
      <style:text-properties fo:font-weight="normal" officeooo:rsid="000d9870" officeooo:paragraph-rsid="000ee3c4" style:font-weight-asian="normal" style:font-weight-complex="normal"/>
    </style:style>
    <style:style style:name="P7" style:family="paragraph" style:parent-style-name="Standard">
      <style:text-properties fo:font-weight="normal" officeooo:rsid="000f6049" officeooo:paragraph-rsid="000f6049" style:font-weight-asian="normal" style:font-weight-complex="normal"/>
    </style:style>
    <style:style style:name="P8" style:family="paragraph" style:parent-style-name="Standard">
      <style:text-properties officeooo:rsid="0009e527" officeooo:paragraph-rsid="0010f410"/>
    </style:style>
    <style:style style:name="P9" style:family="paragraph" style:parent-style-name="Standard">
      <style:text-properties fo:font-weight="normal" officeooo:rsid="000f6049" officeooo:paragraph-rsid="000f604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f095" style:font-weight-asian="bold" style:font-weight-complex="bold"/>
    </style:style>
    <style:style style:name="T3" style:family="text">
      <style:text-properties fo:font-weight="bold" officeooo:rsid="00064ed1" style:font-weight-asian="bold" style:font-weight-complex="bold"/>
    </style:style>
    <style:style style:name="T4" style:family="text">
      <style:text-properties fo:font-weight="bold" officeooo:rsid="000bc961" style:font-weight-asian="bold" style:font-weight-complex="bold"/>
    </style:style>
    <style:style style:name="T5" style:family="text">
      <style:text-properties fo:font-weight="bold" officeooo:rsid="000d9870" style:font-weight-asian="bold" style:font-weight-complex="bold"/>
    </style:style>
    <style:style style:name="T6" style:family="text">
      <style:text-properties fo:font-weight="bold" officeooo:rsid="000f6049" style:font-weight-asian="bold" style:font-weight-complex="bold"/>
    </style:style>
    <style:style style:name="T7" style:family="text">
      <style:text-properties officeooo:rsid="0004f09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4f095" style:font-weight-asian="normal" style:font-weight-complex="normal"/>
    </style:style>
    <style:style style:name="T10" style:family="text">
      <style:text-properties fo:font-weight="normal" officeooo:rsid="00064ed1" style:font-weight-asian="normal" style:font-weight-complex="normal"/>
    </style:style>
    <style:style style:name="T11" style:family="text">
      <style:text-properties fo:font-weight="normal" officeooo:rsid="000802d3" style:font-weight-asian="normal" style:font-weight-complex="normal"/>
    </style:style>
    <style:style style:name="T12" style:family="text">
      <style:text-properties fo:font-weight="normal" officeooo:rsid="000bc961" style:font-weight-asian="normal" style:font-weight-complex="normal"/>
    </style:style>
    <style:style style:name="T13" style:family="text">
      <style:text-properties fo:font-weight="normal" officeooo:rsid="000d9870" style:font-weight-asian="normal" style:font-weight-complex="normal"/>
    </style:style>
    <style:style style:name="T14" style:family="text">
      <style:text-properties fo:font-weight="normal" officeooo:rsid="0010d57c" style:font-weight-asian="normal" style:font-weight-complex="normal"/>
    </style:style>
    <style:style style:name="T15" style:family="text">
      <style:text-properties fo:font-weight="normal" officeooo:rsid="0010f410" style:font-weight-asian="normal" style:font-weight-complex="normal"/>
    </style:style>
    <style:style style:name="T16" style:family="text">
      <style:text-properties fo:font-weight="normal" officeooo:rsid="00130a57" style:font-weight-asian="normal" style:font-weight-complex="normal"/>
    </style:style>
    <style:style style:name="T17" style:family="text">
      <style:text-properties officeooo:rsid="000802d3"/>
    </style:style>
    <style:style style:name="T18" style:family="text">
      <style:text-properties style:text-position="sub 58%" fo:font-weight="normal" style:font-weight-asian="normal" style:font-weight-complex="normal"/>
    </style:style>
    <style:style style:name="T19" style:family="text"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0f6049" style:font-size-asian="12pt" style:font-style-asian="normal" style:font-weight-asian="normal" style:font-weight-complex="normal" style:text-emphasize="none"/>
    </style:style>
    <style:style style:name="T20" style:family="text"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10f410" style:font-size-asian="12pt" style:font-style-asian="normal" style:font-weight-asian="normal" style:font-weight-complex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aption for </text:span><text:span text:style-name="T6">F</text:span><text:span text:style-name="T1">igure </text:span><text:span text:style-name="T3">3</text:span>: Results from predictive modeling of soil <text:span text:style-name="T17">type</text:span> <text:span text:style-name="T17">across</text:span> genotype. <text:span text:style-name="T1">A</text:span> shows <text:span text:style-name="T7">a flowchart that demonstrates the nested prediction approach. </text:span><text:span text:style-name="T2">B</text:span><text:span text:style-name="T9"> shows the results of prediction on the test dataset, where </text:span><text:span text:style-name="T11">the x-axis represents the true soil type and the y-axis represents the soil type predicted by the model. Each dot represents a data-point from the test dataset. B</text:span><text:span text:style-name="T9">ubbles on the diagonal represents accurate correct predictions, </text:span><text:span text:style-name="T11">and off-diagonal bubbles represent incorrect incorrect predictions</text:span><text:span text:style-name="T9">. </text:span><text:span text:style-name="T2">C</text:span><text:span text:style-name="T9"> shows the number of log-ratios involved in each model 1 (NPK ratios) and model 2 (PK ratios) with the number of ASVs in each log-ratio in parentheses, </text:span><text:span text:style-name="T10">as well as</text:span><text:span text:style-name="T9"> the prediction accuracy on the test data set. </text:span><text:span text:style-name="T2">D</text:span><text:span text:style-name="T9"> shows the average cumulative relative abundance of the ASVs involved </text:span><text:span text:style-name="T10">in the prediction (any log-ratio in either model) separated by order.</text:span></text:p>
      <text:p text:style-name="P4"/>
      <text:p text:style-name="P8"><text:span text:style-name="T3">C</text:span><text:span text:style-name="T1">aption for </text:span><text:span text:style-name="T6">F</text:span><text:span text:style-name="T1">igure 5:</text:span><text:span text:style-name="T8"> Summary of results from root exudate data from lotus and hordeum. </text:span><text:span text:style-name="T1">A</text:span><text:span text:style-name="T8"> shows principal coordinates for all non-control samples after filtering out background features, separated by host species. </text:span><text:span text:style-name="T1">B</text:span><text:span text:style-name="T8"> shows a volcano plot with the </text:span><text:span text:style-name="T14">estimated</text:span><text:span text:style-name="T8"> log</text:span><text:span text:style-name="T18">2</text:span><text:span text:style-name="T8"> fold-change compared to wild-type for each of the CSSP mutant on the x-axis, and an appropriately transformed FDR-adjusted p-value on the y-axis. Dots are coloured </text:span><text:span text:style-name="T14">by</text:span><text:span text:style-name="T8"> statistically significantly </text:span><text:span text:style-name="T14">depletion, enrichment, or not difference (NS)</text:span><text:span text:style-name="T8"> </text:span><text:span text:style-name="T14">between</text:span><text:span text:style-name="T8"> wild-type, </text:span><text:span text:style-name="T14">and the genotype indicated by the panel</text:span><text:span text:style-name="T8">. The number in the corner of each panel shows the number of features that statistically significantly different between wild-type and the corresponding mutant. </text:span><text:span text:style-name="T14">Features with estimated</text:span><text:span text:style-name="T8"> log</text:span><text:span text:style-name="T18">2</text:span><text:span text:style-name="T8"> fold-change </text:span><text:span text:style-name="T14">above 30 were omitted from the figure for visual purposes.</text:span><text:span text:style-name="T8"> </text:span><text:span text:style-name="T1">C</text:span><text:span text:style-name="T8"> illustrates the number of features of each class </text:span><text:span text:style-name="T15">(by ClassyFire)</text:span><text:span text:style-name="T8"> that are statistically significantly different between </text:span><text:span text:style-name="T12">wild-type, and the mutant on the x-axis, separated by host species. </text:span><text:span text:style-name="T15">For visual purposes, o</text:span><text:span text:style-name="T19">nly classes </text:span><text:span text:style-name="T20">where</text:span><text:span text:style-name="T19"> at least two metabolites are differentially exudated in at least one mutant compared to </text:span><text:span text:style-name="T20">wild-type is shown</text:span><text:span text:style-name="T19">.</text:span><text:span text:style-name="T12"> </text:span><text:span text:style-name="T4">D</text:span><text:span text:style-name="T12"> shows boxplots that illustrate the intensities measured for each genotype for a selection of features. </text:span><text:span text:style-name="T13">An asterisk indicates that a statistically significantly difference between the wild-type and the mutant it is displayed over was found for the features indicated by the panel.</text:span></text:p>
      <text:p text:style-name="P5"/>
      <text:p text:style-name="P2"><text:span text:style-name="T5">C</text:span><text:span text:style-name="T1">aption for </text:span><text:span text:style-name="T6">S</text:span><text:span text:style-name="T1">upplementary </text:span><text:span text:style-name="T6">F</text:span><text:span text:style-name="T1">igure 5:</text:span><text:span text:style-name="T8"> Boxplots showing the cumulative intensity of each pathway </text:span><text:span text:style-name="T16">(by NPC classifier)</text:span><text:span text:style-name="T8">, separated by genotype and host species. </text:span><text:span text:style-name="T13">An asterisk indicates that a statistically significantly difference between the wild-type and the mutant it is displayed over was found for the </text:span><text:span text:style-name="T8">pathway</text:span><text:span text:style-name="T13"> indicated by the panel.</text:span></text:p>
      <text:p text:style-name="P6"/>
      <text:p text:style-name="P3"><text:span text:style-name="T5">C</text:span><text:span text:style-name="T1">aption for Supplementary Table 4:</text:span><text:span text:style-name="T8"> Results from comparisons of intensities between wild-type and CSSP mutant in lotus. The first column denotes the feature id, the next four columns denotes whether a statistically significant difference was found between the wild-type and the mutant after which the column is named. A 1 indicates enrichment, -1 indicates depletion, and 0 indicates that no significance was found. The next twenty columns indicates the measured intensities for each features, and the remaining columns indicate the feature annotations.</text:span></text:p>
      <text:p text:style-name="P7"/>
      <text:p text:style-name="P3"><text:span text:style-name="T5">C</text:span><text:span text:style-name="T1">aption for Supplementary Table 5:</text:span><text:span text:style-name="T8"> Results from comparisons of intensities between wild-type and CSSP mutant in hordeum. The first column denotes the feature id, the next four columns denotes whether a statistically significant difference was found between the wild-type and the mutant after which the column is named. A 1 indicates enrichment, -1 indicates depletion, and 0 indicates that no significance was found. The next twenty columns indicates the measured intensities for each features, and the remaining columns indicate the feature annotations.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4:17:09.871026970</meta:creation-date>
    <dc:date>2026-02-17T15:46:25.849504504</dc:date>
    <meta:editing-duration>PT30M1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5" meta:word-count="566" meta:character-count="3736" meta:non-whitespace-character-count="3175"/>
  </office:meta>
</office:document-meta>
</file>