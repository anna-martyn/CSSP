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c868f" officeooo:paragraph-rsid="000c868f" style:font-weight-asian="bold" style:font-weight-complex="bold"/>
    </style:style>
    <style:style style:name="P2" style:family="paragraph" style:parent-style-name="Standard">
      <style:text-properties fo:font-weight="normal" officeooo:rsid="000c868f" officeooo:paragraph-rsid="000c868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c868f" officeooo:paragraph-rsid="000c868f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c868f" officeooo:paragraph-rsid="000c868f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c868f" officeooo:paragraph-rsid="000c868f" style:font-weight-asian="normal" style:font-weight-complex="normal"/>
    </style:style>
    <style:style style:name="P6" style:family="paragraph" style:parent-style-name="Standard" style:list-style-name="L1">
      <style:text-properties fo:color="#bf0041" loext:opacity="100%" fo:font-weight="bold" officeooo:rsid="000c868f" officeooo:paragraph-rsid="000c868f" style:font-weight-asian="bold" style:font-weight-complex="bold"/>
    </style:style>
    <style:style style:name="P7" style:family="paragraph" style:parent-style-name="Standard" style:list-style-name="L2">
      <style:text-properties fo:color="#bf0041" loext:opacity="100%" fo:font-weight="bold" officeooo:rsid="000c868f" officeooo:paragraph-rsid="000c868f" style:font-weight-asian="bold" style:font-weight-complex="bold"/>
    </style:style>
    <style:style style:name="P8" style:family="paragraph" style:parent-style-name="Standard" style:list-style-name="L3">
      <style:text-properties fo:color="#bf0041" loext:opacity="100%" fo:font-weight="bold" officeooo:rsid="000c868f" officeooo:paragraph-rsid="000c868f" style:font-weight-asian="bold" style:font-weight-complex="bold"/>
    </style:style>
    <style:style style:name="P9" style:family="paragraph" style:parent-style-name="Standard" style:list-style-name="L3">
      <style:text-properties fo:color="#bf0041" loext:opacity="100%" fo:font-weight="bold" officeooo:rsid="000da9a9" officeooo:paragraph-rsid="000da9a9" style:font-weight-asian="bold" style:font-weight-complex="bold"/>
    </style:style>
    <style:style style:name="P10" style:family="paragraph" style:parent-style-name="Standard" style:list-style-name="L1">
      <style:text-properties fo:color="#000000" loext:opacity="100%" fo:font-weight="normal" officeooo:rsid="000c868f" officeooo:paragraph-rsid="000c868f" style:font-weight-asian="normal" style:font-weight-complex="normal"/>
    </style:style>
    <style:style style:name="P11" style:family="paragraph" style:parent-style-name="Standard" style:list-style-name="L2">
      <style:text-properties fo:color="#000000" loext:opacity="100%" fo:font-weight="normal" officeooo:rsid="000da9a9" officeooo:paragraph-rsid="000da9a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ckages used in scripts</text:p>
      <text:p text:style-name="P2"/>
      <text:p text:style-name="P1">Visualisation</text:p>
      <text:list xml:id="list92028209" text:style-name="L1">
        <text:list-item>
          <text:p text:style-name="P3">ggplot2</text:p>
        </text:list-item>
        <text:list-item>
          <text:p text:style-name="P3">multcompView</text:p>
        </text:list-item>
        <text:list-item>
          <text:p text:style-name="P3">ggforce</text:p>
        </text:list-item>
        <text:list-item>
          <text:p text:style-name="P3">ggh4x</text:p>
        </text:list-item>
        <text:list-item>
          <text:p text:style-name="P3">ggalluvial</text:p>
        </text:list-item>
        <text:list-item>
          <text:p text:style-name="P3">ggVennDiagram</text:p>
        </text:list-item>
        <text:list-item>
          <text:p text:style-name="P3">ggtext</text:p>
        </text:list-item>
        <text:list-item>
          <text:p text:style-name="P3">patchwork</text:p>
        </text:list-item>
        <text:list-item>
          <text:p text:style-name="P3">cowplot</text:p>
        </text:list-item>
        <text:list-item>
          <text:p text:style-name="P3">grid</text:p>
        </text:list-item>
        <text:list-item>
          <text:p text:style-name="P3">magick</text:p>
        </text:list-item>
        <text:list-item>
          <text:p text:style-name="P3">ggpubr</text:p>
        </text:list-item>
        <text:list-item>
          <text:p text:style-name="P6">colorRamp2</text:p>
        </text:list-item>
        <text:list-item>
          <text:p text:style-name="P10">gridExtra</text:p>
        </text:list-item>
        <text:list-item>
          <text:p text:style-name="P10">Gmisc</text:p>
        </text:list-item>
        <text:list-item>
          <text:p text:style-name="P10">glue</text:p>
        </text:list-item>
        <text:list-item>
          <text:p text:style-name="P10">htmlTable</text:p>
        </text:list-item>
        <text:list-item>
          <text:p text:style-name="P10">ggfortify</text:p>
        </text:list-item>
        <text:list-item>
          <text:p text:style-name="P10">gridtext</text:p>
        </text:list-item>
        <text:list-item>
          <text:p text:style-name="P10">scales</text:p>
        </text:list-item>
      </text:list>
      <text:p text:style-name="P1">Data manipulation</text:p>
      <text:list xml:id="list3555794130" text:style-name="L2">
        <text:list-item>
          <text:p text:style-name="P4">dplyr</text:p>
        </text:list-item>
        <text:list-item>
          <text:p text:style-name="P4">data.table</text:p>
        </text:list-item>
        <text:list-item>
          <text:p text:style-name="P4">tidyr</text:p>
        </text:list-item>
        <text:list-item>
          <text:p text:style-name="P4">tibble</text:p>
        </text:list-item>
        <text:list-item>
          <text:p text:style-name="P4">stringr</text:p>
        </text:list-item>
        <text:list-item>
          <text:p text:style-name="P7">magrittr</text:p>
        </text:list-item>
        <text:list-item>
          <text:p text:style-name="P7">tidyverse</text:p>
        </text:list-item>
        <text:list-item>
          <text:p text:style-name="P11">forcats</text:p>
        </text:list-item>
      </text:list>
      <text:p text:style-name="P1">Statistical analysis</text:p>
      <text:list xml:id="list3804326071" text:style-name="L3">
        <text:list-item>
          <text:p text:style-name="P5">phyloseq</text:p>
        </text:list-item>
        <text:list-item>
          <text:p text:style-name="P5">vegan</text:p>
        </text:list-item>
        <text:list-item>
          <text:p text:style-name="P5">Maaslin2</text:p>
        </text:list-item>
        <text:list-item>
          <text:p text:style-name="P5">codacore</text:p>
        </text:list-item>
        <text:list-item>
          <text:p text:style-name="P5">tensorflow</text:p>
        </text:list-item>
        <text:list-item>
          <text:p text:style-name="P8">car</text:p>
        </text:list-item>
        <text:list-item>
          <text:p text:style-name="P9">FS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55:20.537504246</meta:creation-date>
    <dc:date>2026-03-09T14:46:42.894427067</dc:date>
    <meta:editing-duration>PT10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79" meta:character-count="363" meta:non-whitespace-character-count="358"/>
  </office:meta>
</office:document-meta>
</file>